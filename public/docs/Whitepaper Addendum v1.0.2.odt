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itepaper Addendum v1.0.2</text:h>
      <text:h text:style-name="Heading_20_2" text:outline-level="2">Foundation Allocation Release Framework Clarification</text:h>
      <text:p text:style-name="Horizontal_20_Line"/>
      <text:h text:style-name="Heading_20_2" text:outline-level="2">1. Purpose of This Addendum</text:h>
      <text:p text:style-name="Text_20_body">This addendum formally defines the deterministic release framework governing the Foundation allocation referenced in Section 7.4 (Allocation Model) of the Diamond Data Chain Whitepaper.</text:p>
      <text:p text:style-name="Text_20_body">The original Whitepaper defines the Foundation allocation (15%) but does not specify its release mechanics.<text:line-break/>This document establishes the authoritative and binding release model.</text:p>
      <text:p text:style-name="Text_20_body">This addendum does not modify:</text:p>
      <text:list text:style-name="L1">
        <text:list-item>
          <text:p text:style-name="P2">Total supply</text:p>
        </text:list-item>
        <text:list-item>
          <text:p text:style-name="P2">Allocation percentages</text:p>
        </text:list-item>
        <text:list-item>
          <text:p text:style-name="P2">Presale, Team, Advisor, Treasury or Reward Pool logic</text:p>
        </text:list-item>
        <text:list-item>
          <text:p text:style-name="P2">The original Whitepaper hash</text:p>
        </text:list-item>
      </text:list>
      <text:p text:style-name="Text_20_body">All provisions defined herein are enforceable through on-chain governance and smart contract logic.</text:p>
      <text:p text:style-name="Horizontal_20_Line"/>
      <text:h text:style-name="Heading_20_2" text:outline-level="2">2. Scope and Authority</text:h>
      <text:p text:style-name="Text_20_body">This document applies exclusively to:</text:p>
      <text:p text:style-name="Text_20_body"><text:span text:style-name="Strong_20_Emphasis">Foundation Allocation — 15% (38,400,000 DDC)</text:span></text:p>
      <text:p text:style-name="Text_20_body">No other allocation category is affected.</text:p>
      <text:p text:style-name="Horizontal_20_Line"/>
      <text:h text:style-name="Heading_20_2" text:outline-level="2">3. Foundation Allocation (Reference)</text:h>
      <text:p text:style-name="Text_20_body">Category: Foundation<text:line-break/>Allocation: 15%<text:line-break/>Tokens: 38,400,000 DDC</text:p>
      <text:p text:style-name="Text_20_body">Purpose (as defined in Whitepaper):<text:line-break/>Long-term protocol development, infrastructure, legal and compliance operations, and strategic initiatives aligned with network sustainability.</text:p>
      <text:p text:style-name="Horizontal_20_Line"/>
      <text:h text:style-name="Heading_20_1" text:outline-level="1"><text:soft-page-break/>4. Foundation Release Model (Structured)</text:h>
      <text:p text:style-name="Text_20_body">The Foundation allocation follows a governance-controlled, time-structured deterministic release schedule.</text:p>
      <text:h text:style-name="Heading_20_3" text:outline-level="3">4.1 TGE Unlock</text:h>
      <text:p text:style-name="Text_20_body">0% unlocked at TGE.</text:p>
      <text:p text:style-name="Text_20_body">No immediate release occurs at TGE.</text:p>
      <text:p text:style-name="Horizontal_20_Line"/>
      <text:h text:style-name="Heading_20_3" text:outline-level="3">4.2 Initial Cliff</text:h>
      <text:p text:style-name="Text_20_body">6-month cliff from TGE.</text:p>
      <text:p text:style-name="Text_20_body">During this period:</text:p>
      <text:list text:style-name="L2">
        <text:list-item>
          <text:p text:style-name="P3">No Foundation tokens are transferable</text:p>
        </text:list-item>
        <text:list-item>
          <text:p text:style-name="P3">No claim is possible</text:p>
        </text:list-item>
        <text:list-item>
          <text:p text:style-name="P3">Tokens remain escrowed</text:p>
        </text:list-item>
      </text:list>
      <text:p text:style-name="Horizontal_20_Line"/>
      <text:h text:style-name="Heading_20_3" text:outline-level="3">4.3 Linear Release Phase</text:h>
      <text:p text:style-name="Text_20_body">Following the 6-month cliff:</text:p>
      <text:p text:style-name="Text_20_body">30-month linear release</text:p>
      <text:p text:style-name="Text_20_body">Total release duration: 36 months from TGE.</text:p>
      <text:p text:style-name="Text_20_body">Release Characteristics:</text:p>
      <text:list text:style-name="L3">
        <text:list-item>
          <text:p text:style-name="P4">Time-based</text:p>
        </text:list-item>
        <text:list-item>
          <text:p text:style-name="P4">Deterministic</text:p>
        </text:list-item>
        <text:list-item>
          <text:p text:style-name="P4">Non-discretionary</text:p>
        </text:list-item>
        <text:list-item>
          <text:p text:style-name="P4">Calculated proportionally per second</text:p>
        </text:list-item>
      </text:list>
      <text:p text:style-name="Horizontal_20_Line"/>
      <text:h text:style-name="Heading_20_3" text:outline-level="3">4.4 Release Formula</text:h>
      <text:p text:style-name="Text_20_body">Let:</text:p>
      <text:p text:style-name="Text_20_body">F = Total Foundation Allocation (38,400,000 DDC)<text:line-break/>t = current timestamp<text:line-break/>T₀ = TGE timestamp</text:p>
      <text:p text:style-name="Text_20_body"><text:soft-page-break/>If t &lt; T₀ + 6 months:<text:line-break/>Released = 0</text:p>
      <text:p text:style-name="Text_20_body">If t ≥ T₀ + 6 months:</text:p>
      <text:p text:style-name="Text_20_body">Released = F × ((t − (T₀ + 6m)) / 30m)</text:p>
      <text:p text:style-name="Text_20_body">Capped at F.</text:p>
      <text:p text:style-name="Horizontal_20_Line"/>
      <text:h text:style-name="Heading_20_1" text:outline-level="1">5. Governance-Controlled Access Mechanism</text:h>
      <text:p text:style-name="Text_20_body">Released tokens:</text:p>
      <text:list text:style-name="L4">
        <text:list-item>
          <text:p text:style-name="P5">Are claimable only via governance-approved proposal execution</text:p>
        </text:list-item>
        <text:list-item>
          <text:p text:style-name="P5">Require DAO vote approval</text:p>
        </text:list-item>
        <text:list-item>
          <text:p text:style-name="P5">Are subject to on-chain execution constraints</text:p>
        </text:list-item>
        <text:list-item>
          <text:p text:style-name="P5">Cannot exceed the released amount</text:p>
        </text:list-item>
      </text:list>
      <text:p text:style-name="Text_20_body">No administrative override exists.</text:p>
      <text:p text:style-name="Text_20_body">No emergency unlock exists.</text:p>
      <text:p text:style-name="Horizontal_20_Line"/>
      <text:h text:style-name="Heading_20_1" text:outline-level="1">6. On-Chain Enforcement</text:h>
      <text:p text:style-name="Text_20_body">Foundation tokens are escrowed in a dedicated Foundation Release Contract.</text:p>
      <text:p text:style-name="Text_20_body">The contract:</text:p>
      <text:list text:style-name="L5">
        <text:list-item>
          <text:p text:style-name="P6">References immutable TGE timestamp</text:p>
        </text:list-item>
        <text:list-item>
          <text:p text:style-name="P6">Calculates releasable amount deterministically</text:p>
        </text:list-item>
        <text:list-item>
          <text:p text:style-name="P6">Exposes read-only release view function</text:p>
        </text:list-item>
        <text:list-item>
          <text:p text:style-name="P6">Allows transfer only through governance execution</text:p>
        </text:list-item>
        <text:list-item>
          <text:p text:style-name="P6">Cannot be upgraded to accelerate release</text:p>
        </text:list-item>
      </text:list>
      <text:p text:style-name="Horizontal_20_Line"/>
      <text:h text:style-name="Heading_20_1" text:outline-level="1">7. Whitepaper Consistency Statement</text:h>
      <text:p text:style-name="Text_20_body">This addendum operationalizes the “continuous allocation subject to governance-approved rules and on-chain constraints” language in Section 7.4.</text:p>
      <text:p text:style-name="Text_20_body">It does not alter economic neutrality, burn mechanics, or vesting segmentation.</text:p>
      <text:p text:style-name="Horizontal_20_Line"><text:soft-page-break/></text:p>
      <text:h text:style-name="Heading_20_1" text:outline-level="1">8. Document Integrity</text:h>
      <text:p text:style-name="Text_20_body">This addendum is intended to be:</text:p>
      <text:list text:style-name="L6">
        <text:list-item>
          <text:p text:style-name="P7">Hashed (SHA-256)</text:p>
        </text:list-item>
        <text:list-item>
          <text:p text:style-name="P7">Signed by Project Authority</text:p>
        </text:list-item>
        <text:list-item>
          <text:p text:style-name="P7">Published alongside the original Whitepaper and Advisor Addendum</text:p>
        </text:list-item>
        <text:list-item>
          <text:p text:style-name="P7">Version-locked in repository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amond Data Chain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as System Architect</meta:initial-creator>
    <meta:creation-date>2026-02-15T13:11:53.750094745</meta:creation-date>
    <dc:date>2026-02-15T13:13:10.172208103</dc:date>
    <dc:creator>Adamas System Architect</dc:creator>
    <meta:editing-duration>PT1M16S</meta:editing-duration>
    <meta:editing-cycles>1</meta:editing-cycles>
    <meta:document-statistic meta:table-count="0" meta:image-count="0" meta:object-count="0" meta:page-count="4" meta:paragraph-count="71" meta:word-count="438" meta:character-count="3006" meta:non-whitespace-character-count="2666"/>
    <meta:generator>LibreOffice/24.2.7.2$Linux_X86_64 LibreOffice_project/420$Build-2</meta:generator>
  </office:meta>
</office:document-meta>
</file>