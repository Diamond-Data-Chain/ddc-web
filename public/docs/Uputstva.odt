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T1" style:family="text">
      <style:text-properties officeooo:rsid="0003c21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vo tačnih uputstava koje možeš da daš timovima (kratko, izvršno, bez filozofije). Podeljeno po timovima + “Definition of Done”.</text:p>
      <text:p text:style-name="Horizontal_20_Line"/>
      <text:h text:style-name="Heading_20_2" text:outline-level="2">1) Smart Contract tim (Solidity)</text:h>
      <text:p text:style-name="Text_20_body"><text:span text:style-name="Strong_20_Emphasis">Cilj:</text:span> uskladiti kod sa WP logikom (TGE vesting, presale finalize → reward pool → burn lock/validators, multisig→DAO).</text:p>
      <text:p text:style-name="Text_20_body"><text:span text:style-name="Strong_20_Emphasis">Zadaci:</text:span></text:p>
      <text:list text:style-name="L1">
        <text:list-item>
          <text:p text:style-name="P1"><text:span text:style-name="Strong_20_Emphasis">TGE u presale vestingu</text:span></text:p>
          <text:list>
            <text:list-item>
              <text:p text:style-name="P1">Dodati globalni <text:span text:style-name="Source_20_Text">tgeTimestamp</text:span> (ili ekvivalent) i <text:span text:style-name="Source_20_Text">setTGE()</text:span> <text:span text:style-name="Strong_20_Emphasis">jednokratno</text:span>.</text:p>
            </text:list-item>
            <text:list-item>
              <text:p text:style-name="P1">Pre TGE: <text:span text:style-name="Source_20_Text">claim()</text:span> = 0 (zabranjeno ili vraća 0).</text:p>
            </text:list-item>
            <text:list-item>
              <text:p text:style-name="P1">Na TGE: <text:span text:style-name="Source_20_Text">initialUnlockBps = 10%</text:span> (ako WP tako kaže).</text:p>
            </text:list-item>
            <text:list-item>
              <text:p text:style-name="P1">Ostatak: linear unlock od TGE.</text:p>
            </text:list-item>
          </text:list>
        </text:list-item>
        <text:list-item>
          <text:p text:style-name="P1"><text:span text:style-name="Strong_20_Emphasis">Presale finalize posle 40. batch-a</text:span></text:p>
          <text:list>
            <text:list-item>
              <text:p text:style-name="P1"><text:span text:style-name="Source_20_Text">finalizePresale()</text:span> izračuna neprodato.</text:p>
            </text:list-item>
            <text:list-item>
              <text:p text:style-name="P1">Neprodato se šalje u <text:span text:style-name="Source_20_Text">DDCRewardPool</text:span>.</text:p>
            </text:list-item>
            <text:list-item>
              <text:p text:style-name="P1">RewardPool: prvih <text:span text:style-name="Strong_20_Emphasis">51.2M</text:span> iz tog priliva → <text:span text:style-name="Strong_20_Emphasis">locked for burn</text:span>, višak → <text:span text:style-name="Strong_20_Emphasis">validator rewards</text:span>.</text:p>
            </text:list-item>
          </text:list>
        </text:list-item>
        <text:list-item>
          <text:p text:style-name="P1"><text:span text:style-name="Strong_20_Emphasis">VestingVault governance</text:span></text:p>
          <text:list>
            <text:list-item>
              <text:p text:style-name="P1"><text:span text:style-name="Source_20_Text">DDCVestingVault</text:span> je <text:span text:style-name="Source_20_Text">Ownable</text:span> → owner mora biti <text:span text:style-name="Strong_20_Emphasis">multisig 3/5</text:span> u presale fazi.</text:p>
            </text:list-item>
            <text:list-item>
              <text:p text:style-name="P1">Posle: plan za <text:span text:style-name="Source_20_Text">transferOwnership(DAOExecutor/Timelock)</text:span> (ako dizajn dopušta).</text:p>
            </text:list-item>
          </text:list>
        </text:list-item>
        <text:list-item>
          <text:p text:style-name="P1"><text:span text:style-name="Strong_20_Emphasis">ABI freeze</text:span></text:p>
          <text:list>
            <text:list-item>
              <text:p text:style-name="P1">Zaključati ABI-eve: kad se potpiše “v1”, UI se više ne lomi.</text:p>
            </text:list-item>
          </text:list>
        </text:list-item>
      </text:list>
      <text:p text:style-name="Text_20_body"><text:span text:style-name="Strong_20_Emphasis">DoD:</text:span></text:p>
      <text:list text:style-name="L2">
        <text:list-item>
          <text:p text:style-name="P2">Testovi koji potvrđuju: <text:span text:style-name="Source_20_Text">claimable == 0</text:span> pre TGE, <text:span text:style-name="Source_20_Text">10%</text:span> na TGE, linear posle.</text:p>
        </text:list-item>
        <text:list-item>
          <text:p text:style-name="P2">Test koji potvrđuje finalize → reward pool → burn lock/validator split.</text:p>
        </text:list-item>
        <text:list-item>
          <text:p text:style-name="P2">Deploy skripta koja postavlja owner na multisig adresu.</text:p>
        </text:list-item>
      </text:list>
      <text:p text:style-name="Horizontal_20_Line"/>
      <text:h text:style-name="Heading_20_2" text:outline-level="2">2) Web3 Frontend tim (Next.js / Ethers)</text:h>
      <text:p text:style-name="Text_20_body"><text:span text:style-name="Strong_20_Emphasis">Cilj:</text:span> UI da 100% čita on-chain stanje, bez “UI nagađanja”, i da prati tačnu WP logiku.</text:p>
      <text:p text:style-name="Text_20_body"><text:span text:style-name="Strong_20_Emphasis">Zadaci:</text:span></text:p>
      <text:list text:style-name="L3">
        <text:list-item>
          <text:p text:style-name="P3"><text:span text:style-name="Strong_20_Emphasis">Jedan “source of truth” za adrese i chain</text:span></text:p>
          <text:list>
            <text:list-item>
              <text:p text:style-name="P3"><text:soft-page-break/><text:span text:style-name="Source_20_Text">app/config/contracts.ts</text:span> (ili slično) sa <text:span text:style-name="Source_20_Text">NEXT_PUBLIC_*</text:span>.</text:p>
            </text:list-item>
            <text:list-item>
              <text:p text:style-name="P3">Nema hardcodovanih adresa po komponentama.</text:p>
            </text:list-item>
          </text:list>
        </text:list-item>
        <text:list-item>
          <text:p text:style-name="P3"><text:span text:style-name="Strong_20_Emphasis">PresaleDashboard mora prikazivati isključivo on-chain</text:span></text:p>
          <text:list>
            <text:list-item>
              <text:p text:style-name="P3">Current batch, price, remaining, sold, user purchased, claimable, claimed.</text:p>
            </text:list-item>
            <text:list-item>
              <text:p text:style-name="P3">Sve iz <text:span text:style-name="Source_20_Text">DDCPresaleVesting</text:span> + eventualno <text:span text:style-name="Source_20_Text">DDCVestingVault</text:span>.</text:p>
            </text:list-item>
          </text:list>
        </text:list-item>
        <text:list-item>
          <text:p text:style-name="P3"><text:span text:style-name="Strong_20_Emphasis">TGE prikaz</text:span></text:p>
          <text:list>
            <text:list-item>
              <text:p text:style-name="P3">UI prikazuje: “TGE not set / TGE date / countdown”.</text:p>
            </text:list-item>
            <text:list-item>
              <text:p text:style-name="P3">Pre TGE: claim dugme disabled + tooltip “Claim starts at TGE”.</text:p>
            </text:list-item>
            <text:list-item>
              <text:p text:style-name="P3">Na TGE: prikaz “Initial unlock 10% available”.</text:p>
            </text:list-item>
          </text:list>
        </text:list-item>
        <text:list-item>
          <text:p text:style-name="P3"><text:span text:style-name="Strong_20_Emphasis">Finalize / Reward Pool status</text:span></text:p>
          <text:list>
            <text:list-item>
              <text:p text:style-name="P3">Sekcija “Presale close / finalize status” (read-only).</text:p>
            </text:list-item>
            <text:list-item>
              <text:p text:style-name="P3">Sekcija “Reward Pool”:</text:p>
              <text:list>
                <text:list-item>
                  <text:p text:style-name="P3">Unsold moved amount</text:p>
                </text:list-item>
                <text:list-item>
                  <text:p text:style-name="P3">Burn-locked = min(unsold, 51.2M)</text:p>
                </text:list-item>
                <text:list-item>
                  <text:p text:style-name="P3">Validator rewards = max(unsold-51.2M, 0)</text:p>
                </text:list-item>
              </text:list>
            </text:list-item>
          </text:list>
        </text:list-item>
        <text:list-item>
          <text:p text:style-name="P3"><text:span text:style-name="Strong_20_Emphasis">Multisig / governance</text:span></text:p>
          <text:list>
            <text:list-item>
              <text:p text:style-name="P3">UI samo prikazuje:</text:p>
              <text:list>
                <text:list-item>
                  <text:p text:style-name="P3"><text:span text:style-name="Source_20_Text">owner()</text:span> adrese za Vault/critical contracts</text:p>
                </text:list-item>
                <text:list-item>
                  <text:p text:style-name="P3">link ka explorer-u za multisig</text:p>
                </text:list-item>
              </text:list>
            </text:list-item>
            <text:list-item>
              <text:p text:style-name="P3">UI ne “upravlja” multisig-om, samo transparentnost.</text:p>
            </text:list-item>
          </text:list>
        </text:list-item>
      </text:list>
      <text:p text:style-name="Text_20_body"><text:span text:style-name="Strong_20_Emphasis">DoD:</text:span></text:p>
      <text:list text:style-name="L4">
        <text:list-item>
          <text:p text:style-name="P4">Nema TypeScript/lint grešaka.</text:p>
        </text:list-item>
        <text:list-item>
          <text:p text:style-name="P4">Nema duplih varijabli, nema “used before declared”.</text:p>
        </text:list-item>
        <text:list-item>
          <text:p text:style-name="P4">Svi brojevi tačni (decimals), svi pozivi safe (try/catch, loading states).</text:p>
        </text:list-item>
        <text:list-item>
          <text:p text:style-name="P4">“Read-only” view radi bez connect wallet.</text:p>
        </text:list-item>
      </text:list>
      <text:p text:style-name="Horizontal_20_Line"/>
      <text:h text:style-name="Heading_20_2" text:outline-level="2">3) Backend/Indexer tim (ako koristiš)</text:h>
      <text:p text:style-name="Text_20_body"><text:span text:style-name="Strong_20_Emphasis">Cilj:</text:span> brz prikaz istorije i agregacija bez opterećenja RPC-a.</text:p>
      <text:p text:style-name="Text_20_body"><text:span text:style-name="Strong_20_Emphasis">Zadaci:</text:span></text:p>
      <text:list text:style-name="L5">
        <text:list-item>
          <text:p text:style-name="P5">Listener za <text:span text:style-name="Source_20_Text">TokensPurchased</text:span>, <text:span text:style-name="Source_20_Text">Claimed</text:span>, <text:span text:style-name="Source_20_Text">PresaleFinalized</text:span>, <text:span text:style-name="Source_20_Text">MovedToRewardPool</text:span>, <text:span text:style-name="Source_20_Text">BurnLocked</text:span>.</text:p>
        </text:list-item>
        <text:list-item>
          <text:p text:style-name="P5"><text:soft-page-break/>API za “My purchases history” i “system stats”.</text:p>
        </text:list-item>
      </text:list>
      <text:p text:style-name="Text_20_body"><text:span text:style-name="Strong_20_Emphasis">DoD:</text:span></text:p>
      <text:list text:style-name="L6">
        <text:list-item>
          <text:p text:style-name="P6">UI prikazuje istoriju kupovina bez pozivanja 500 RPC poziva.</text:p>
        </text:list-item>
      </text:list>
      <text:p text:style-name="Horizontal_20_Line"/>
      <text:h text:style-name="Heading_20_2" text:outline-level="2">4) QA / Testing tim</text:h>
      <text:p text:style-name="Text_20_body"><text:span text:style-name="Strong_20_Emphasis">Test plan (minimalno):</text:span></text:p>
      <text:list text:style-name="L7">
        <text:list-item>
          <text:p text:style-name="P7">Kupovina Batch 1 i Batch 40 → isti TGE unlock (10%) na launch, ne 100%.</text:p>
        </text:list-item>
        <text:list-item>
          <text:p text:style-name="P7">Pre TGE: claim=0.</text:p>
        </text:list-item>
        <text:list-item>
          <text:p text:style-name="P7">Finalize: neprodato prebačeno, burn lock 51.2M, višak validatorima.</text:p>
        </text:list-item>
        <text:list-item>
          <text:p text:style-name="P7">Multisig owner: proveriti <text:span text:style-name="Source_20_Text">owner()</text:span> na deploy-u.</text:p>
        </text:list-item>
      </text:list>
      <text:p text:style-name="Horizontal_20_Line"/>
      <text:h text:style-name="Heading_20_2" text:outline-level="2">5) Legal/Compliance (kratko)</text:h>
      <text:p text:style-name="Text_20_body"><text:span text:style-name="Strong_20_Emphasis">Zadaci:</text:span></text:p>
      <text:list text:style-name="L8">
        <text:list-item>
          <text:p text:style-name="P8">Tekst na sajtu: “Presale terms”, “Vesting rules”, “Risk disclosure”.</text:p>
        </text:list-item>
        <text:list-item>
          <text:p text:style-name="P8">“WP is source of truth” + link na hash/commit.</text:p>
        </text:list-item>
      </text:list>
      <text:p text:style-name="Horizontal_20_Line"/>
      <text:h text:style-name="Heading_20_1" text:outline-level="1">Definition of Done za “funkcionalan web”</text:h>
      <text:p text:style-name="Text_20_body">Web je “skroz funkcionalan” kad:</text:p>
      <text:list text:style-name="L9">
        <text:list-item>
          <text:p text:style-name="P9">Presale kupovina + stanje radi.</text:p>
        </text:list-item>
        <text:list-item>
          <text:p text:style-name="P9">Vesting/claim radi tačno po TGE pravilima.</text:p>
        </text:list-item>
        <text:list-item>
          <text:p text:style-name="P9">Finalize i Reward Pool logika vidljiva i proverljiva.</text:p>
        </text:list-item>
        <text:list-item>
          <text:p text:style-name="P9">Owner/multisig transparentno prikazan.</text:p>
        </text:list-item>
        <text:list-item>
          <text:p text:style-name="P9">Nema build/lint/type error-a.</text:p>
        </text:list-item>
      </text:list>
      <text:p text:style-name="Text_20_body">Ako hoćeš, napišem ti ovo kao “Task list” koji možeš copy/paste u Trello/Jira (kratke tick-box stavke).</text:p>
      <text:p text:style-name="Text_20_body">da ali nisi uključio da dizanj nikako ne smeju da diraju </text:p>
      <text:p text:style-name="Text_20_body">Razumem. Evo istih uputstava, ali sa <text:span text:style-name="Strong_20_Emphasis">hard pravilom: dizajn se NE dira</text:span>.</text:p>
      <text:p text:style-name="Horizontal_20_Line"/>
      <text:h text:style-name="Heading_20_2" text:outline-level="2">0) HARD RULE (za sve timove)</text:h>
      <text:p text:style-name="Text_20_body"><text:span text:style-name="Strong_20_Emphasis">Dizajn/UX se NE menja.</text:span></text:p>
      <text:list text:style-name="L10">
        <text:list-item>
          <text:p text:style-name="P10"><text:soft-page-break/>Nema promena layout-a, boja, fontova, spacing-a, komponenti.</text:p>
        </text:list-item>
        <text:list-item>
          <text:p text:style-name="P10">Nema “refactor UI” pod izgovorom optimizacije.</text:p>
        </text:list-item>
        <text:list-item>
          <text:p text:style-name="P10">Dozvoljeno je samo:</text:p>
          <text:list>
            <text:list-item>
              <text:p text:style-name="P10">popravka bugova</text:p>
            </text:list-item>
            <text:list-item>
              <text:p text:style-name="P10">povezivanje funkcija (wiring)</text:p>
            </text:list-item>
            <text:list-item>
              <text:p text:style-name="P10">dodavanje <text:span text:style-name="Emphasis">minimalnih</text:span> elemenata ako baš ne postoji mesto (npr. jedan red teksta “TGE not set”), ali bez menjanja postojećeg layout-a.</text:p>
            </text:list-item>
          </text:list>
        </text:list-item>
      </text:list>
      <text:p text:style-name="Text_20_body"><text:span text:style-name="Strong_20_Emphasis">Svaka UI promena = bug.</text:span></text:p>
      <text:p text:style-name="Horizontal_20_Line"/>
      <text:h text:style-name="Heading_20_2" text:outline-level="2">1) Smart Contract tim (Solidity)</text:h>
      <text:p text:style-name="Text_20_body"><text:span text:style-name="Strong_20_Emphasis">Zadatak:</text:span> isključivo WP usklađivanje i logika, bez UI priče.</text:p>
      <text:list text:style-name="L11">
        <text:list-item>
          <text:p text:style-name="P11">Dodati TGE anchor (vesting start = launch/TGE, 10% na TGE).</text:p>
        </text:list-item>
        <text:list-item>
          <text:p text:style-name="P11"><text:span text:style-name="Source_20_Text">claim()</text:span> pre TGE = 0/disabled.</text:p>
        </text:list-item>
        <text:list-item>
          <text:p text:style-name="P11"><text:span text:style-name="Source_20_Text">finalizePresale()</text:span> → neprodato u Reward Pool → 51.2M locked for burn → višak validatorima.</text:p>
        </text:list-item>
        <text:list-item>
          <text:p text:style-name="P11"><text:span text:style-name="Source_20_Text">DDCVestingVault</text:span> owner = multisig 3/5 u presale.</text:p>
        </text:list-item>
      </text:list>
      <text:p text:style-name="Text_20_body"><text:span text:style-name="Strong_20_Emphasis">DoD:</text:span> testovi + deploy skripte.</text:p>
      <text:p text:style-name="Horizontal_20_Line"/>
      <text:h text:style-name="Heading_20_2" text:outline-level="2">2) Frontend tim (Next.js/Web3)</text:h>
      <text:p text:style-name="Text_20_body"><text:span text:style-name="Strong_20_Emphasis">Zadatak:</text:span> samo povezivanje na postojeći dizajn.</text:p>
      <text:list text:style-name="L12">
        <text:list-item>
          <text:p text:style-name="P12">Ne menjati komponentu vizuelno.</text:p>
        </text:list-item>
        <text:list-item>
          <text:p text:style-name="P12">Samo popuniti postojeće polja pravim on-chain vrednostima.</text:p>
        </text:list-item>
        <text:list-item>
          <text:p text:style-name="P12">Dodati “TGE status” kao <text:span text:style-name="Emphasis">minimalni text</text:span> u postojećem bloku (bez premeštanja UI).</text:p>
        </text:list-item>
        <text:list-item>
          <text:p text:style-name="P12">Dugmad: samo enable/disable + poruka, bez restilizacije.</text:p>
        </text:list-item>
      </text:list>
      <text:p text:style-name="Text_20_body"><text:span text:style-name="Strong_20_Emphasis">DoD:</text:span> build bez grešaka + tačni brojevi + isti UI.</text:p>
      <text:p text:style-name="Horizontal_20_Line"/>
      <text:h text:style-name="Heading_20_2" text:outline-level="2">3) QA tim</text:h>
      <text:p text:style-name="Text_20_body"><text:span text:style-name="Strong_20_Emphasis">Zadatak:</text:span> pored funkcionalnih testova ima i <text:span text:style-name="Strong_20_Emphasis">Design Lock test</text:span>:</text:p>
      <text:list text:style-name="L13">
        <text:list-item>
          <text:p text:style-name="P13">screenshot diff pre/posle (pixel/perceptual)</text:p>
        </text:list-item>
        <text:list-item>
          <text:p text:style-name="P13">ako se razlikuje UI → FAIL.</text:p>
        </text:list-item>
      </text:list>
      <text:p text:style-name="Horizontal_20_Line"/>
      <text:h text:style-name="Heading_20_2" text:outline-level="2"><text:soft-page-break/>4) Pravilo za PR/commit (obavezno)</text:h>
      <text:list text:style-name="L14">
        <text:list-item>
          <text:p text:style-name="P14">PR koji dira CSS/Tailwind klase/UI komponente = automatski odbijen.</text:p>
        </text:list-item>
        <text:list-item>
          <text:p text:style-name="P14">PR mora imati label: <text:span text:style-name="Strong_20_Emphasis">“Logic-only / No-UI-change”</text:span>.</text:p>
        </text:list-item>
      </text:list>
      <text:p text:style-name="Horizontal_20_Line"/>
      <text:h text:style-name="Heading_20_2" text:outline-level="2">Jedna rečenica koju m<text:span text:style-name="T1">oraš da zapamtiš</text:span></text:h>
      <text:p text:style-name="Text_20_body"><text:span text:style-name="Strong_20_Emphasis">“Ne dirate dizajn ni milimetar. Radite isključivo wiring + bugfix + WP logic. Svaka UI promena je regresija.”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amas System Architect</meta:initial-creator>
    <meta:creation-date>2026-02-15T12:40:59.881241269</meta:creation-date>
    <dc:date>2026-02-15T13:17:20.512821226</dc:date>
    <dc:creator>Adamas System Architect</dc:creator>
    <meta:editing-duration>PT26M8S</meta:editing-duration>
    <meta:editing-cycles>1</meta:editing-cycles>
    <meta:document-statistic meta:table-count="0" meta:image-count="0" meta:object-count="0" meta:page-count="5" meta:paragraph-count="110" meta:word-count="818" meta:character-count="5087" meta:non-whitespace-character-count="4452"/>
    <meta:generator>LibreOffice/24.2.7.2$Linux_X86_64 LibreOffice_project/420$Build-2</meta:generator>
  </office:meta>
</office:document-meta>
</file>